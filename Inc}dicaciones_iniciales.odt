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a1" style:family="table">
      <style:table-properties style:width="11.538cm" table:align="left"/>
    </style:style>
    <style:style style:name="Tabla1.A" style:family="table-column">
      <style:table-column-properties style:column-width="4.519cm"/>
    </style:style>
    <style:style style:name="Tabla1.B" style:family="table-column">
      <style:table-column-properties style:column-width="7.019cm"/>
    </style:style>
    <style:style style:name="Tab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a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a2" style:family="table">
      <style:table-properties style:width="8.721cm" table:align="left"/>
    </style:style>
    <style:style style:name="Tabla2.A" style:family="table-column">
      <style:table-column-properties style:column-width="3.709cm"/>
    </style:style>
    <style:style style:name="Tabla2.B" style:family="table-column">
      <style:table-column-properties style:column-width="5.011cm"/>
    </style:style>
    <style:style style:name="Tabl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a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officeooo:paragraph-rsid="00147407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11280c"/>
    </style:style>
    <style:style style:name="P5" style:family="paragraph" style:parent-style-name="Heading_20_4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</style:style>
    <style:style style:name="P6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117f9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1280c" officeooo:paragraph-rsid="0011280c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1280c" officeooo:paragraph-rsid="00117f9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17f9d" officeooo:paragraph-rsid="00117f9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11280c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14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fo:color="#000000" loext:opacity="100%" style:font-name="quote-cjk-patch" fo:font-size="11.25pt" fo:font-style="normal" fo:font-weight="normal"/>
    </style:style>
    <style:style style:name="P15" style:family="paragraph" style:parent-style-name="Table_20_Contents">
      <style:paragraph-properties style:line-height-at-least="0.661cm"/>
      <style:text-properties fo:font-variant="normal" fo:text-transform="none" fo:color="#000000" loext:opacity="100%" style:font-name="quote-cjk-patch" fo:font-size="11.25pt" fo:font-style="normal" fo:font-weight="normal"/>
    </style:style>
    <style:style style:name="P16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fo:color="#000000" loext:opacity="100%" style:font-name="quote-cjk-patch" fo:font-size="11.25pt" fo:font-style="normal" fo:font-weight="bold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2" style:family="paragraph" style:parent-style-name="Text_20_body" style:list-style-name="L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38" style:family="paragraph" style:parent-style-name="Text_20_body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officeooo:paragraph-rsid="00147407"/>
    </style:style>
    <style:style style:name="T1" style:family="text">
      <style:text-properties officeooo:rsid="00117f9d"/>
    </style:style>
    <style:style style:name="T2" style:family="text"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T3" style:family="text"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4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style:font-name="quote-cjk-patch" fo:font-size="12pt" fo:letter-spacing="normal" fo:font-style="normal" fo:font-weight="bold"/>
    </style:style>
    <style:style style:name="T7" style:family="text">
      <style:text-properties fo:font-variant="normal" fo:text-transform="none" style:font-name="quote-cjk-patch" fo:font-size="15pt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10" style:family="text">
      <style:text-properties fo:font-variant="normal" fo:text-transform="none" fo:color="#000000" loext:opacity="100%" style:font-name="quote-cjk-patch" fo:font-size="15pt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quote-cjk-patch" fo:font-size="15pt" fo:letter-spacing="normal" fo:font-style="normal" fo:font-weight="bold" officeooo:rsid="00147407"/>
    </style:style>
    <style:style style:name="T12" style:family="text">
      <style:text-properties officeooo:rsid="001435eb"/>
    </style:style>
    <style:style style:name="T13" style:family="text">
      <style:text-properties style:font-name="quote-cjk-patch" fo:font-size="15pt" fo:font-weight="bold"/>
    </style:style>
    <style:style style:name="T14" style:family="text">
      <style:text-properties fo:color="#f9fafb" loext:opacity="100%" style:font-name="quote-cjk-patch" fo:font-size="15pt" fo:font-weight="bold"/>
    </style:style>
    <style:style style:name="T15" style:family="text">
      <style:text-properties fo:color="#000000" loext:opacity="100%" style:font-name="quote-cjk-patch" fo:font-size="15pt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Strong_20_Emphasis"><text:span text:style-name="T15">Contexto General</text:span></text:span></text:h>
      <text:p text:style-name="P17"><text:span text:style-name="T8">Debo realizar una adaptación completa de la aplicación "Synapsis", actualmente orientada a un servicio de Neurocirugía del Hospital de Niños de La Plata. El nuevo enfoque está dirigido a </text:span><text:span text:style-name="Strong_20_Emphasis"><text:span text:style-name="T9">médicos pediatras que trabajan en consultorios particulares</text:span></text:span><text:span text:style-name="T8">, atendiendo pacientes desde </text:span><text:span text:style-name="Strong_20_Emphasis"><text:span text:style-name="T9">recién nacidos hasta los 15 años</text:span></text:span><text:span text:style-name="T8">, con énfasis en </text:span><text:span text:style-name="Strong_20_Emphasis"><text:span text:style-name="T9">bebés y niños de corta edad</text:span></text:span><text:span text:style-name="T8">.</text:span></text:p>
      <text:p text:style-name="P1"/>
      <text:h text:style-name="P2" text:outline-level="3"><text:span text:style-name="Strong_20_Emphasis"><text:span text:style-name="T10">Objetivos Principales</text:span></text:span></text:h>
      <text:list text:style-name="L1">
        <text:list-item>
          <text:p text:style-name="P18"><text:span text:style-name="Strong_20_Emphasis"><text:span text:style-name="T9">Eliminar funcionalidades obsoletas</text:span></text:span><text:span text:style-name="T8"> para el nuevo contexto.</text:span></text:p>
        </text:list-item>
        <text:list-item>
          <text:p text:style-name="P18"><text:span text:style-name="Strong_20_Emphasis"><text:span text:style-name="T9">Adaptar funcionalidades existentes</text:span></text:span><text:span text:style-name="T8"> al nuevo flujo de trabajo pediátrico.</text:span></text:p>
        </text:list-item>
        <text:list-item>
          <text:p text:style-name="P18"><text:span text:style-name="Strong_20_Emphasis"><text:span text:style-name="T9">Agregar nuevas funcionalidades</text:span></text:span><text:span text:style-name="T8"> críticas para el consultorio pediátrico.</text:span></text:p>
        </text:list-item>
        <text:list-item>
          <text:p text:style-name="P18"><text:span text:style-name="Strong_20_Emphasis"><text:span text:style-name="T9">Limpiar el repositorio</text:span></text:span><text:span text:style-name="T8"> eliminando archivos no esenciales para esta nueva versión.</text:span></text:p>
        </text:list-item>
      </text:list>
      <text:p text:style-name="P1"/>
      <text:h text:style-name="P2" text:outline-level="3"><text:span text:style-name="Strong_20_Emphasis"><text:span text:style-name="T10">Eliminación de Módulos (Quitar solapas)</text:span></text:span></text:h>
      <text:list text:style-name="L2">
        <text:list-item>
          <text:p text:style-name="P19"><text:span text:style-name="Strong_20_Emphasis"><text:span text:style-name="T9">"Cirugías"</text:span></text:span><text:span text:style-name="T8"> → No aplica a pediatría ambulatoria.</text:span></text:p>
        </text:list-item>
        <text:list-item>
          <text:p text:style-name="P19"><text:span text:style-name="Strong_20_Emphasis"><text:span text:style-name="T9">"Pase" (pase de guardia)</text:span></text:span><text:span text:style-name="T8"> → No aplica a consultorio particular.</text:span></text:p>
        </text:list-item>
        <text:list-item>
          <text:p text:style-name="P19"><text:span text:style-name="Strong_20_Emphasis"><text:span text:style-name="T9">"Stock"</text:span></text:span><text:span text:style-name="T8"> → No aplica a consultorio particular.</text:span></text:p>
        </text:list-item>
      </text:list>
      <text:p text:style-name="P1"/>
      <text:h text:style-name="P2" text:outline-level="3"><text:span text:style-name="Strong_20_Emphasis"><text:span text:style-name="T10">Adaptación de Módulo "Pacientes"</text:span></text:span></text:h>
      <text:p text:style-name="P26">Rediseñar la base de datos de pacientes con los siguientes campos obligatorios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6">Campo</text:p>
            </table:table-cell>
            <table:table-cell table:style-name="Tabla1.A1" office:value-type="string">
              <text:p text:style-name="P16">Tipo/Dato</text:p>
            </table:table-cell>
          </table:table-row>
        </table:table-header-rows>
        <table:table-row>
          <table:table-cell table:style-name="Tabla1.A2" office:value-type="string">
            <text:p text:style-name="P14">Apellido y Nombre</text:p>
          </table:table-cell>
          <table:table-cell table:style-name="Tabla1.A2" office:value-type="string">
            <text:p text:style-name="P14">Texto</text:p>
          </table:table-cell>
        </table:table-row>
        <table:table-row>
          <table:table-cell table:style-name="Tabla1.A2" office:value-type="string">
            <text:p text:style-name="P14">Sexo</text:p>
          </table:table-cell>
          <table:table-cell table:style-name="Tabla1.A2" office:value-type="string">
            <text:p text:style-name="P14">Selector (Masculino/Femenino/Otro)</text:p>
          </table:table-cell>
        </table:table-row>
        <table:table-row>
          <table:table-cell table:style-name="Tabla1.A2" office:value-type="string">
            <text:p text:style-name="P14">Fecha de Nacimiento</text:p>
          </table:table-cell>
          <table:table-cell table:style-name="Tabla1.A2" office:value-type="string">
            <text:p text:style-name="P14">Fecha</text:p>
          </table:table-cell>
        </table:table-row>
        <table:table-row>
          <table:table-cell table:style-name="Tabla1.A2" office:value-type="string">
            <text:p text:style-name="P14">DNI</text:p>
          </table:table-cell>
          <table:table-cell table:style-name="Tabla1.A2" office:value-type="string">
            <text:p text:style-name="P14">Número (opcional para menores)</text:p>
          </table:table-cell>
        </table:table-row>
        <table:table-row>
          <table:table-cell table:style-name="Tabla1.A2" office:value-type="string">
            <text:p text:style-name="P14">Obra Social</text:p>
          </table:table-cell>
          <table:table-cell table:style-name="Tabla1.A2" office:value-type="string">
            <text:p text:style-name="P14">Texto</text:p>
          </table:table-cell>
        </table:table-row>
        <text:soft-page-break/>
        <table:table-row>
          <table:table-cell table:style-name="Tabla1.A2" office:value-type="string">
            <text:p text:style-name="P14">Domicilio</text:p>
          </table:table-cell>
          <table:table-cell table:style-name="Tabla1.A2" office:value-type="string">
            <text:p text:style-name="P14">Texto</text:p>
          </table:table-cell>
        </table:table-row>
        <table:table-row>
          <table:table-cell table:style-name="Tabla1.A2" office:value-type="string">
            <text:p text:style-name="P14">Datos del Padre/Madre</text:p>
          </table:table-cell>
          <table:table-cell table:style-name="Tabla1.A2" office:value-type="string">
            <text:p text:style-name="P14">Nombre, Teléfono, Email</text:p>
          </table:table-cell>
        </table:table-row>
        <table:table-row>
          <table:table-cell table:style-name="Tabla1.A2" office:value-type="string">
            <text:p text:style-name="P14">Fecha de Atención</text:p>
          </table:table-cell>
          <table:table-cell table:style-name="Tabla1.A2" office:value-type="string">
            <text:p text:style-name="P14">Fecha (automática o manual)</text:p>
          </table:table-cell>
        </table:table-row>
        <table:table-row>
          <table:table-cell table:style-name="Tabla1.A2" office:value-type="string">
            <text:p text:style-name="P14">Diagnóstico</text:p>
          </table:table-cell>
          <table:table-cell table:style-name="Tabla1.A2" office:value-type="string">
            <text:p text:style-name="P14">Texto (libre)</text:p>
          </table:table-cell>
        </table:table-row>
        <table:table-row>
          <table:table-cell table:style-name="Tabla1.A2" office:value-type="string">
            <text:p text:style-name="P14">Tratamiento</text:p>
          </table:table-cell>
          <table:table-cell table:style-name="Tabla1.A2" office:value-type="string">
            <text:p text:style-name="P15">Texto (libre)</text:p>
          </table:table-cell>
        </table:table-row>
      </table:table>
      <text:p text:style-name="P17"><text:span text:style-name="Strong_20_Emphasis"><text:span text:style-name="T9">Requisitos adicionales:</text:span></text:span></text:p>
      <text:list text:style-name="L3">
        <text:list-item>
          <text:p text:style-name="P27">Búsqueda rápida por apellido, DNI u obra social.</text:p>
        </text:list-item>
        <text:list-item>
          <text:p text:style-name="P27">Posibilidad de editar y agregar notas en cada consulta.</text:p>
        </text:list-item>
        <text:list-item>
          <text:p text:style-name="P27">Visualización clara en dispositivos móviles (ya que se usará en consultorio).</text:p>
        </text:list-item>
      </text:list>
      <text:p text:style-name="P1"/>
      <text:h text:style-name="P2" text:outline-level="3"><text:span text:style-name="Strong_20_Emphasis"><text:span text:style-name="T10">Adaptación de Módulo "Seguimiento"</text:span></text:span></text:h>
      <text:p text:style-name="P26">Rediseñar para seguimiento pediátrico preventivo:</text:p>
      <text:h text:style-name="P5" text:outline-level="4"><text:span text:style-name="Strong_20_Emphasis"><text:span text:style-name="T9">A. Calendario de Vacunación</text:span></text:span></text:h>
      <text:list text:style-name="L4">
        <text:list-item>
          <text:p text:style-name="P28">Base de datos con el calendario nacional de vacunación (Argentina).</text:p>
        </text:list-item>
        <text:list-item>
          <text:p text:style-name="P20"><text:span text:style-name="T8">Generación automática de </text:span><text:span text:style-name="Strong_20_Emphasis"><text:span text:style-name="T9">alertas por WhatsApp</text:span></text:span><text:span text:style-name="T8"> a los padres/madres cuando se aproxime una vacuna.</text:span></text:p>
        </text:list-item>
        <text:list-item>
          <text:p text:style-name="P28">Opción de marcar vacunas como "Aplicada" con fecha.</text:p>
        </text:list-item>
      </text:list>
      <text:h text:style-name="P6" text:outline-level="4"><text:span text:style-name="Strong_20_Emphasis"><text:span text:style-name="T9">B. Recordatorios de Controles Médicos por Edad</text:span></text:span></text:h>
      <text:p text:style-name="P26">Implementar un sistema de alertas con la siguiente lógica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6">Edad del Paciente</text:p>
            </table:table-cell>
            <table:table-cell table:style-name="Tabla2.A1" office:value-type="string">
              <text:p text:style-name="P16">Frecuencia de Controles</text:p>
            </table:table-cell>
          </table:table-row>
        </table:table-header-rows>
        <table:table-row>
          <table:table-cell table:style-name="Tabla2.A2" office:value-type="string">
            <text:p text:style-name="P14">Recién nacido</text:p>
          </table:table-cell>
          <table:table-cell table:style-name="Tabla2.A2" office:value-type="string">
            <text:p text:style-name="P14">7 días, 14 días, 30 días</text:p>
          </table:table-cell>
        </table:table-row>
        <table:table-row>
          <table:table-cell table:style-name="Tabla2.A2" office:value-type="string">
            <text:p text:style-name="P14">0 a 1 año</text:p>
          </table:table-cell>
          <table:table-cell table:style-name="Tabla2.A2" office:value-type="string">
            <text:p text:style-name="P14">Mensual</text:p>
          </table:table-cell>
        </table:table-row>
        <table:table-row>
          <table:table-cell table:style-name="Tabla2.A2" office:value-type="string">
            <text:p text:style-name="P14">1 a 2 años</text:p>
          </table:table-cell>
          <table:table-cell table:style-name="Tabla2.A2" office:value-type="string">
            <text:p text:style-name="P14">Cada 3 meses</text:p>
          </table:table-cell>
        </table:table-row>
        <table:table-row>
          <table:table-cell table:style-name="Tabla2.A2" office:value-type="string">
            <text:p text:style-name="P14">2 a 4 años</text:p>
          </table:table-cell>
          <table:table-cell table:style-name="Tabla2.A2" office:value-type="string">
            <text:p text:style-name="P14">Cada 6 meses</text:p>
          </table:table-cell>
        </table:table-row>
        <text:soft-page-break/>
        <table:table-row>
          <table:table-cell table:style-name="Tabla2.A2" office:value-type="string">
            <text:p text:style-name="P14">Mayor de 4 años</text:p>
          </table:table-cell>
          <table:table-cell table:style-name="Tabla2.A2" office:value-type="string">
            <text:p text:style-name="P15">Anual</text:p>
          </table:table-cell>
        </table:table-row>
      </table:table>
      <text:p text:style-name="P17"><text:span text:style-name="Strong_20_Emphasis"><text:span text:style-name="T9">Requisitos:</text:span></text:span></text:p>
      <text:list text:style-name="L5">
        <text:list-item>
          <text:p text:style-name="P29">Notificaciones automáticas (WhatsApp, email o push) a los padres.</text:p>
        </text:list-item>
        <text:list-item>
          <text:p text:style-name="P29">Registro de cada control realizado (fecha, observaciones).</text:p>
        </text:list-item>
      </text:list>
      <text:p text:style-name="P1"/>
      <text:h text:style-name="P2" text:outline-level="3"><text:span text:style-name="Strong_20_Emphasis"><text:span text:style-name="T10">Nuevas Funcionalidades</text:span></text:span></text:h>
      <text:h text:style-name="P5" text:outline-level="4"><text:span text:style-name="Strong_20_Emphasis"><text:span text:style-name="T9">1. Base de Datos de Pacientes + Comandos de Voz (CRÍTICO)</text:span></text:span></text:h>
      <text:list text:style-name="L6">
        <text:list-item>
          <text:p text:style-name="P30">Reemplazar las fichas físicas de papel por un sistema digital.</text:p>
        </text:list-item>
        <text:list-item>
          <text:p text:style-name="P21"><text:span text:style-name="Strong_20_Emphasis"><text:span text:style-name="T9">Comando de voz</text:span></text:span><text:span text:style-name="T8">: Permitir cargar datos de pacientes (nombre, diagnóstico, etc.) usando el micrófono nativo del celular.</text:span></text:p>
        </text:list-item>
        <text:list-item>
          <text:p text:style-name="P22"><text:span text:style-name="Strong_20_Emphasis"><text:span text:style-name="T9">Pregunta para análisis técnico</text:span></text:span><text:span text:style-name="T8">:</text:span></text:p>
          <text:list>
            <text:list-item>
              <text:p text:style-name="P30">¿Es factible implementar esto sin costos excesivos de tokens/API? (ej. usando reconocimiento de voz offline o nativo del dispositivo).</text:p>
            </text:list-item>
            <text:list-item>
              <text:p text:style-name="P30">¿Qué librerías o herramientas recomiendas para iOS/Android?</text:p>
            </text:list-item>
            <text:list-item>
              <text:p text:style-name="P30">¿Cómo se integraría con la base de datos existente?</text:p>
            </text:list-item>
          </text:list>
        </text:list-item>
      </text:list>
      <text:h text:style-name="P5" text:outline-level="4"><text:span text:style-name="Strong_20_Emphasis"><text:span text:style-name="T9">2. Generación de Historia Clínica / Informe Pediátrico</text:span></text:span></text:h>
      <text:list text:style-name="L7">
        <text:list-item>
          <text:p text:style-name="P31">Opción para generar un informe pediátrico en PDF o documento editable.</text:p>
        </text:list-item>
        <text:list-item>
          <text:p text:style-name="P32">Debe incluir:</text:p>
          <text:list>
            <text:list-item>
              <text:p text:style-name="P31">Datos personales del paciente.</text:p>
            </text:list-item>
            <text:list-item>
              <text:p text:style-name="P31">Antecedentes.</text:p>
            </text:list-item>
            <text:list-item>
              <text:p text:style-name="P31">Controles realizados.</text:p>
            </text:list-item>
            <text:list-item>
              <text:p text:style-name="P31">Vacunación.</text:p>
            </text:list-item>
            <text:list-item>
              <text:p text:style-name="P31">Diagnósticos y tratamientos.</text:p>
            </text:list-item>
          </text:list>
        </text:list-item>
        <text:list-item>
          <text:p text:style-name="P31">Debe ser descargable o imprimible desde el consultorio.</text:p>
        </text:list-item>
      </text:list>
      <text:h text:style-name="P5" text:outline-level="4"><text:span text:style-name="Strong_20_Emphasis"><text:span text:style-name="T9">3. Funcionalidad Opcional (a considerar)</text:span></text:span></text:h>
      <text:list text:style-name="L8">
        <text:list-item>
          <text:p text:style-name="P23"><text:span text:style-name="Strong_20_Emphasis"><text:span text:style-name="T9">"Cuadernito de Crecimiento Digital"</text:span></text:span><text:span text:style-name="T8">:</text:span></text:p>
          <text:list>
            <text:list-item>
              <text:p text:style-name="P33">Reemplazar el cuadernillo físico que llevan las madres.</text:p>
            </text:list-item>
            <text:list-item>
              <text:p text:style-name="P33">Registrar talla, peso, perímetro cefálico.</text:p>
            </text:list-item>
            <text:list-item>
              <text:p text:style-name="P33">Mostrar evolución automática según curvas de crecimiento (OMS).</text:p>
            </text:list-item>
            <text:list-item>
              <text:p text:style-name="P33"><text:soft-page-break/>Generar alertas si el percentil está fuera de rango.</text:p>
            </text:list-item>
            <text:list-item>
              <text:p text:style-name="P33">Enfoque principal en niños de 0 a 2 años.</text:p>
            </text:list-item>
          </text:list>
        </text:list-item>
      </text:list>
      <text:p text:style-name="P1"/>
      <text:h text:style-name="P2" text:outline-level="3"><text:span text:style-name="Strong_20_Emphasis"><text:span text:style-name="T10">Adicional: Limpieza del Repositorio</text:span></text:span></text:h>
      <text:list text:style-name="L9">
        <text:list-item>
          <text:p text:style-name="P24"><text:span text:style-name="T8">Revisar el repositorio local y </text:span><text:span text:style-name="Strong_20_Emphasis"><text:span text:style-name="T9">eliminar</text:span></text:span><text:span text:style-name="T8">:</text:span></text:p>
          <text:list>
            <text:list-item>
              <text:p text:style-name="P34">Archivos relacionados con cirugías, pase de guardia y stock.</text:p>
            </text:list-item>
            <text:list-item>
              <text:p text:style-name="P34">Dependencias o librerías no utilizadas.</text:p>
            </text:list-item>
            <text:list-item>
              <text:p text:style-name="P34">Código obsoleto o comentado.</text:p>
            </text:list-item>
          </text:list>
        </text:list-item>
        <text:list-item>
          <text:p text:style-name="P34">Mantener solo lo necesario para la nueva versión pediátrica.</text:p>
        </text:list-item>
        <text:list-item>
          <text:p text:style-name="P25"><text:span text:style-name="Strong_20_Emphasis"><text:span text:style-name="T9">Entregar</text:span></text:span><text:span text:style-name="T8">: Una estructura de carpetas clara y documentación básica del nuevo flujo.</text:span></text:p>
        </text:list-item>
      </text:list>
      <text:p text:style-name="P1"/>
      <text:h text:style-name="P3" text:outline-level="3"><text:span text:style-name="Strong_20_Emphasis"><text:span text:style-name="T11">A</text:span></text:span><text:span text:style-name="Strong_20_Emphasis"><text:span text:style-name="T10">gregado:</text:span></text:span></text:h>
      <text:h text:style-name="P3" text:outline-level="3"><text:span text:style-name="Strong_20_Emphasis"><text:span text:style-name="T10">- </text:span></text:span><text:span text:style-name="Strong_20_Emphasis"><text:span text:style-name="T11">Deba haber un </text:span></text:span><text:span text:style-name="Strong_20_Emphasis"><text:span text:style-name="T10"><text:s/>cambio de base de datos de "Airtable" ( no puede haber solapamiento con la actual base de datos de Synapsis"</text:span></text:span></text:h>
      <text:p text:style-name="P38"><text:span text:style-name="Strong_20_Emphasis"><text:span text:style-name="T10"/></text:span></text:p>
      <text:p text:style-name="P37"><text:span text:style-name="Strong_20_Emphasis"><text:span text:style-name="T10">- </text:span></text:span></text:p>
      <text:h text:style-name="P2" text:outline-level="3"><text:span text:style-name="Strong_20_Emphasis"><text:span text:style-name="T10">Preguntas Directas para Claude Code</text:span></text:span></text:h>
      <text:list text:style-name="L10">
        <text:list-item>
          <text:p text:style-name="P35">¿Cuál es el enfoque más eficiente para implementar el reconocimiento de voz sin costos elevados?</text:p>
        </text:list-item>
        <text:list-item>
          <text:p text:style-name="P35">¿Qué base de datos (SQLite, Firebase, etc.) recomiendas para este tipo de app con datos sensibles?</text:p>
        </text:list-item>
        <text:list-item>
          <text:p text:style-name="P35">¿Cómo estructurarías las notificaciones por WhatsApp? (¿API de Twilio, WhatsApp Business, u otra?)</text:p>
        </text:list-item>
        <text:list-item>
          <text:p text:style-name="P35"><text:soft-page-break/>¿Qué archivos del repositorio actual consideras prescindibles para esta nueva versión?</text:p>
        </text:list-item>
        <text:list-item>
          <text:p text:style-name="P35">¿Qué recomendaciones técnicas das para la generación de informes PDF desde una app móvil?</text:p>
        </text:list-item>
      </text:list>
      <text:p text:style-name="P1"/>
      <text:h text:style-name="P2" text:outline-level="3"><text:span text:style-name="Strong_20_Emphasis"><text:span text:style-name="T10">Entregables Esperados</text:span></text:span></text:h>
      <text:list text:style-name="L11">
        <text:list-item>
          <text:p text:style-name="P36">Plan de migración/adaptación del código.</text:p>
        </text:list-item>
        <text:list-item>
          <text:p text:style-name="P36">Lista de archivos a eliminar.</text:p>
        </text:list-item>
        <text:list-item>
          <text:p text:style-name="P36">Propuesta técnica para comandos de voz.</text:p>
        </text:list-item>
        <text:list-item>
          <text:p text:style-name="P36">Wireframe o flujo de navegación básico para la nueva app.</text:p>
        </text:list-item>
        <text:list-item>
          <text:p text:style-name="P36">Estimación de tiempo y recursos.</text:p>
        </text:list-item>
      </text:list>
      <text:p text:style-name="P12"/>
      <text:p text:style-name="P1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2T07:51:42.374933299</meta:creation-date>
    <dc:date>2026-06-22T08:40:54.314904581</dc:date>
    <meta:editing-duration>PT25M24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5" meta:paragraph-count="108" meta:word-count="726" meta:character-count="4612" meta:non-whitespace-character-count="4043"/>
  </office:meta>
</office:document-meta>
</file>